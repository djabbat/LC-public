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color="#000000" fo:font-size="12pt" style:font-size-asian="12pt" style:font-size-complex="12pt" fo:hyphenate="true"/>
    </style:style>
    <style:style style:name="T6" style:parent-style-name="Fuentedepárrafopredeter." style:family="text">
      <style:text-properties style:font-name-complex="Calibri" fo:color="#000000" fo:font-size="12pt" style:font-size-asian="12pt" style:font-size-complex="12pt"/>
    </style:style>
    <style:style style:name="T7" style:parent-style-name="Fuentedepárrafopredeter." style:family="text">
      <style:text-properties style:font-name-complex="Calibri" fo:color="#000000"/>
    </style:style>
    <style:style style:name="P8" style:parent-style-name="Normal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6"><text:s/></text:span><text:span text:style-name="T7">PASOS PARA ACCEDER A SU SOLICITUD DE ACCESO A ESTUDIOS CON TITULACIÓN EXTRANJERA</text:span>:</text:p>
      <text:p text:style-name="Normal"/>
      <text:p text:style-name="Normal"><draw:custom-shape svg:x="4.98542in" svg:y="0.00556in" svg:width="0.28125in" svg:height="0.90625in" draw:z-index="251677696" draw:id="id0" draw:style-name="a0" draw:name="Flecha: hacia abajo 14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5837 46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Si no tiene todavía identificador debe registrarse antes.</text:p>
      <text:p text:style-name="Normal"/>
      <text:p text:style-name="Normal"/>
      <text:p text:style-name="Normal"><draw:frame draw:style-name="a1" draw:name="Imagen 1" text:anchor-type="as-char" svg:x="0in" svg:y="0in" svg:width="5.90556in" svg:height="2.50625in" style:rel-width="scale" style:rel-height="scale"><draw:image xlink:href="media/image1.png" xlink:type="simple" xlink:show="embed" xlink:actuate="onLoad"/><svg:title/><svg:desc>Captura de pantalla de un celular

El contenido generado por IA puede ser incorrecto.</svg:desc></draw:frame></text:p>
      <text:p text:style-name="Normal"/>
      <text:p text:style-name="Normal"/>
      <text:p text:style-name="Normal"><draw:frame draw:style-name="a2" draw:name="Imagen 1" text:anchor-type="as-char" svg:x="0in" svg:y="0in" svg:width="5.90556in" svg:height="1.62014in" style:rel-width="scale" style:rel-height="scale"><draw:image xlink:href="media/image2.png" xlink:type="simple" xlink:show="embed" xlink:actuate="onLoad"/><svg:title/><svg:desc>Interfaz de usuario gráfica

El contenido generado por IA puede ser incorrecto.</svg:desc></draw:frame></text:p>
      <text:soft-page-break/>
      <text:p text:style-name="Normal">Accederá a esta página para registrar sus datos:<text:s/><draw:frame draw:style-name="a3" draw:name="Imagen 1" text:anchor-type="as-char" svg:x="0in" svg:y="0in" svg:width="5.90556in" svg:height="2.83542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p>
      <text:p text:style-name="Normal"/>
      <text:p text:style-name="Normal"/>
      <text:p text:style-name="Normal">Una vez registrado, acceda al<text:s/>CAMPUS UNED para identificarse con Usuario y Contraseña</text:p>
      <text:p text:style-name="Normal"><draw:custom-shape svg:x="2.05833in" svg:y="1.54514in" svg:width="1.05139in" svg:height="0.19792in" draw:z-index="251679744" draw:id="id1" draw:style-name="a4" draw:name="Flecha: hacia la izquierda 5" text:anchor-type="paragraph"><svg:title/><svg:desc/><draw:enhanced-geometry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03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?f12 * ?f13"/><draw:equation draw:name="f17" draw:formula="21600 * ?f14"/><draw:equation draw:name="f18" draw:formula="0 * ?f14"/><draw:equation draw:name="f19" draw:formula="?f16 / 10800"/><draw:equation draw:name="f20" draw:formula="?f18 / ?f14"/><draw:equation draw:name="f21" draw:formula="?f17 / ?f14"/><draw:equation draw:name="f22" draw:formula="?f12 - ?f19"/><draw:equation draw:name="f23" draw:formula="$0 / ?f6"/><draw:equation draw:name="f24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svg:x="1.975in" svg:y="1.11875in" svg:width="1.05139in" svg:height="0.19792in" draw:z-index="251663360" draw:id="id2" draw:style-name="a5" draw:name="Flecha: hacia la izquierda 5" text:anchor-type="paragraph"><svg:title/><svg:desc/><draw:enhanced-geometry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03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?f12 * ?f13"/><draw:equation draw:name="f17" draw:formula="21600 * ?f14"/><draw:equation draw:name="f18" draw:formula="0 * ?f14"/><draw:equation draw:name="f19" draw:formula="?f16 / 10800"/><draw:equation draw:name="f20" draw:formula="?f18 / ?f14"/><draw:equation draw:name="f21" draw:formula="?f17 / ?f14"/><draw:equation draw:name="f22" draw:formula="?f12 - ?f19"/><draw:equation draw:name="f23" draw:formula="$0 / ?f6"/><draw:equation draw:name="f24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draw:style-name="a6" draw:name="Imagen 3" text:anchor-type="as-char" svg:x="0in" svg:y="0in" svg:width="5.90556in" svg:height="2.754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Una vez dentro del área de estudiante. Acceda a la Secretaría:</text:p>
      <text:p text:style-name="Normal"><draw:custom-shape svg:x="0in" svg:y="0.46875in" svg:width="0.22917in" svg:height="1.07292in" draw:z-index="251673600" draw:id="id3" draw:style-name="a7" draw:name="Flecha: hacia abajo 14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929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draw:frame draw:style-name="a8" draw:name="Imagen 18" text:anchor-type="as-char" svg:x="0in" svg:y="0in" svg:width="5.90556in" svg:height="2.9638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En la siguiente pantalla, acceda a Solicitudes</text:p>
      <text:p text:style-name="Normal"/>
      <text:p text:style-name="Normal"/>
      <text:p text:style-name="Normal"><draw:custom-shape svg:x="2.92708in" svg:y="6.875in" svg:width="1.57292in" svg:height="0.28125in" draw:z-index="251671552" draw:id="id4" draw:style-name="a9" draw:name="Flecha: hacia la izquierda 2" text:anchor-type="paragraph"><svg:title/><svg:desc/><draw:enhanced-geometry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03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?f12 * ?f13"/><draw:equation draw:name="f17" draw:formula="21600 * ?f14"/><draw:equation draw:name="f18" draw:formula="0 * ?f14"/><draw:equation draw:name="f19" draw:formula="?f16 / 10800"/><draw:equation draw:name="f20" draw:formula="?f18 / ?f14"/><draw:equation draw:name="f21" draw:formula="?f17 / ?f14"/><draw:equation draw:name="f22" draw:formula="?f12 - ?f19"/><draw:equation draw:name="f23" draw:formula="$0 / ?f6"/><draw:equation draw:name="f24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draw:style-name="a10" draw:name="Imagen 1" text:anchor-type="as-char" svg:x="0in" svg:y="0in" svg:width="5.90556in" svg:height="3.03125in" style:rel-width="scale" style:rel-height="scale"><draw:image xlink:href="media/image6.png" xlink:type="simple" xlink:show="embed" xlink:actuate="onLoad"/><svg:title/><svg:desc>Interfaz de usuario gráfica, Texto

El contenido generado por IA puede ser incorrecto.</svg:desc></draw:frame></text:p>
      <text:p text:style-name="P8"/>
      <text:p text:style-name="Normal">Desde la siguiente ventana, puede iniciar una solicitud, o si ya<text:s/>la ha realizado puede<text:s/>editarla<text:s/>(con el botón Modificar)<text:s/><text:s/>para finalizar los pasos o subir documentos en pdf y realizar el pago:</text:p>
      <text:p text:style-name="Normal"/>
      <text:p text:style-name="Normal"/>
      <text:p text:style-name="Normal"><draw:custom-shape svg:x="5.61458in" svg:y="1.13472in" svg:width="1.05139in" svg:height="0.19792in" draw:z-index="251675648" draw:id="id5" draw:style-name="a11" draw:name="Flecha: hacia la izquierda 5" text:anchor-type="paragraph"><svg:title/><svg:desc/><draw:enhanced-geometry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03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?f12 * ?f13"/><draw:equation draw:name="f17" draw:formula="21600 * ?f14"/><draw:equation draw:name="f18" draw:formula="0 * ?f14"/><draw:equation draw:name="f19" draw:formula="?f16 / 10800"/><draw:equation draw:name="f20" draw:formula="?f18 / ?f14"/><draw:equation draw:name="f21" draw:formula="?f17 / ?f14"/><draw:equation draw:name="f22" draw:formula="?f12 - ?f19"/><draw:equation draw:name="f23" draw:formula="$0 / ?f6"/><draw:equation draw:name="f24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svg:x="2.77708in" svg:y="1.49514in" svg:width="0.22917in" svg:height="1.07292in" draw:z-index="251666432" draw:id="id6" draw:style-name="a12" draw:name="Flecha: hacia abajo 14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929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draw:frame draw:style-name="a13" draw:name="Imagen 13" text:anchor-type="as-char" svg:x="0in" svg:y="0in" svg:width="5.90556in" svg:height="2.97361in" style:rel-width="scale" style:rel-height="scale"><draw:image xlink:href="media/image7.png" xlink:type="simple" xlink:show="embed" xlink:actuate="onLoad"/><svg:title/><svg:desc/></draw:frame></text:p>
      <text:p text:style-name="Normal">Elija Solicitud de Autorización de Acceso a Máster<text:s/>o Solicitud<text:s/>de Autorización de Acceso a Doctorado según el programa al que quiere postular:<text:s/></text:p>
      <text:p text:style-name="Normal"><draw:custom-shape svg:x="-0.45208in" svg:y="0.62986in" svg:width="1.21875in" svg:height="0.11389in" draw:z-index="251669504" draw:id="id7" draw:style-name="a14" draw:name="Flecha: a la derecha 17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585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svg:x="-0.48333in" svg:y="0.53611in" svg:width="1.21875in" svg:height="0.11389in" draw:z-index="251667456" draw:id="id8" draw:style-name="a15" draw:name="Flecha: a la derecha 16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585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draw:style-name="a16" draw:name="Imagen 15" text:anchor-type="as-char" svg:x="0in" svg:y="0in" svg:width="5.90556in" svg:height="2.54861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Rellene los campos con la información sobre su titulación (para Doctorado será necesario que incluya la información y documentos del título de Grado y del Máster):</text:p>
      <text:p text:style-name="Normal"><draw:frame draw:style-name="a17" draw:name="Imagen 1" text:anchor-type="as-char" svg:x="0in" svg:y="0in" svg:width="5.90556in" svg:height="3.52361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>Recuerde realizar el pago (preferiblemente con tarjeta de crédito):</text:p>
      <text:p text:style-name="Normal"><draw:frame draw:style-name="a18" draw:name="Imagen 19" text:anchor-type="as-char" svg:x="0in" svg:y="0in" svg:width="5.90556in" svg:height="3.05069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hora suba los documentos en formato pdf (seleccione el documento y luego pinche en Enviar Doc. PDF:</text:p>
      <text:p text:style-name="Normal"/>
      <text:p text:style-name="Normal"><draw:frame draw:style-name="a19" draw:name="Imagen 1" text:anchor-type="as-char" svg:x="0in" svg:y="0in" svg:width="5.90556in" svg:height="3.11319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Si no dispone de todos los documentos inicialmente, puede finalizar la solicitud para que se grabe y conste como realizada, y posteriormente entrar de nuevo a editarla para incluir el resto de documentos. 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fault" style:display-name="Default" style:family="paragraph">
      <style:paragraph-properties style:text-autospace="none" fo:margin-bottom="0in"/>
      <style:text-properties style:font-name-complex="Calibri" fo:color="#000000" fo:font-size="12pt" style:font-size-asian="12pt" style:font-size-complex="12pt" fo:hyphenate="false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fo:font-size="10pt" style:font-size-asian="10pt" style:font-size-complex="10pt"/>
    </style:style>
    <style:style style:name="P3" style:parent-style-name="Encabezado" style:family="paragraph">
      <style:text-properties fo:font-size="10pt" style:font-size-asian="10pt" style:font-size-complex="10pt"/>
    </style:style>
    <style:style style:name="P4" style:parent-style-name="Piedepágina" style:family="paragraph">
      <style:paragraph-properties fo:text-align="center"/>
    </style:style>
    <style:style style:name="T5" style:parent-style-name="Fuentedepárrafopredeter." style:family="text">
      <style:text-properties fo:text-transform="uppercase" fo:color="#4472C4"/>
    </style:style>
  </office:automatic-styles>
  <office:master-styles>
    <style:master-page style:name="MP0" style:page-layout-name="PL0">
      <style:header>
        <text:p text:style-name="P2">Sección Títulos Extranjeros</text:p>
        <text:p text:style-name="P3">Servicio de Ordenación Académica</text:p>
      </style:header>
      <style:footer>
        <text:p text:style-name="P4"><text:span text:style-name="T5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ARIO MIRANZO HUERTA</meta:initial-creator>
    <dc:creator>ROSARIO MIRANZO HUERTA</dc:creator>
    <meta:creation-date>2023-03-14T12:17:00Z</meta:creation-date>
    <dc:date>2026-03-18T12:39:00Z</dc:date>
    <meta:template xlink:href="Normal" xlink:type="simple"/>
    <meta:editing-cycles>12</meta:editing-cycles>
    <meta:editing-duration>PT5040S</meta:editing-duration>
    <meta:document-statistic meta:page-count="6" meta:paragraph-count="15" meta:word-count="213" meta:character-count="1319" meta:row-count="74" meta:non-whitespace-character-count="1121"/>
  </office:meta>
</office:document-meta>
</file>